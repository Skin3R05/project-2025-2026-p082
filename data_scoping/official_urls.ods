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2B2B2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6D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6F9D4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D428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860D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5429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3838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666666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9.86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fficial_url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itle</text:p>
          </table:table-cell>
          <table:table-cell office:value-type="string" table:style-name="ce2">
            <text:p>UR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ourses</text:p>
          </table:table-cell>
          <table:table-cell office:value-type="string" table:style-name="ce4">
            <text:p>https://ipb.pt/pt/estudar/curso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Applications</text:p>
          </table:table-cell>
          <table:table-cell office:value-type="string" table:style-name="ce4">
            <text:p>https://ipb.pt/pt/estudar/candidatura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tudents</text:p>
          </table:table-cell>
          <table:table-cell office:value-type="string" table:style-name="ce4">
            <text:p>https://ipb.pt/pt/estudar/estudant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o study+</text:p>
          </table:table-cell>
          <table:table-cell office:value-type="string" table:style-name="ce4">
            <text:p>https://ipb.pt/pt/estudar/estudarmais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rasmus+</text:p>
          </table:table-cell>
          <table:table-cell office:value-type="string" table:style-name="ce4">
            <text:p>https://ipb.pt/pt/internacionalizar/erasmus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nternational Mobility</text:p>
          </table:table-cell>
          <table:table-cell office:value-type="string" table:style-name="ce4">
            <text:p>https://ipb.pt/pt/internacionalizar/mobilidade-internacional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Double Diplomation</text:p>
          </table:table-cell>
          <table:table-cell office:value-type="string" table:style-name="ce4">
            <text:p>https://ipb.pt/pt/internacionalizar/dupla-diplomacao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nternationalize+</text:p>
          </table:table-cell>
          <table:table-cell office:value-type="string" table:style-name="ce4">
            <text:p>https://ipb.pt/pt/internacionalizar/internacionalizar-mais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Centers and Units</text:p>
          </table:table-cell>
          <table:table-cell office:value-type="string" table:style-name="ce4">
            <text:p>https://ipb.pt/pt/investigar/centros-e-unidades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Project Support</text:p>
          </table:table-cell>
          <table:table-cell office:value-type="string" table:style-name="ce4">
            <text:p>https://ipb.pt/pt/investigar/apoio-a-projetos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Impact</text:p>
          </table:table-cell>
          <table:table-cell office:value-type="string" table:style-name="ce4">
            <text:p>https://ipb.pt/pt/investigar/impac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Investigate+</text:p>
          </table:table-cell>
          <table:table-cell office:value-type="string" table:style-name="ce4">
            <text:p>https://ipb.pt/pt/investigar/investigar-mais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Formative Innovation</text:p>
          </table:table-cell>
          <table:table-cell office:value-type="string" table:style-name="ce4">
            <text:p>https://ipb.pt/pt/co-criar/inovacao-formativ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ntrepreneurship</text:p>
          </table:table-cell>
          <table:table-cell office:value-type="string" table:style-name="ce4">
            <text:p>https://ipb.pt/pt/co-criar/empreendedorism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mployability</text:p>
          </table:table-cell>
          <table:table-cell office:value-type="string" table:style-name="ce4">
            <text:p>https://ipb.pt/pt/co-criar/empregabilidad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Co-Create+</text:p>
          </table:table-cell>
          <table:table-cell office:value-type="string" table:style-name="ce4">
            <text:p>https://ipb.pt/pt/co-criar/co-criar-mais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Portugal | Region | Cities</text:p>
          </table:table-cell>
          <table:table-cell office:value-type="string" table:style-name="ce4">
            <text:p>https://ipb.pt/pt/viver/portugal-regiao-cidades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Culture</text:p>
          </table:table-cell>
          <table:table-cell office:value-type="string" table:style-name="ce4">
            <text:p>https://ipb.pt/pt/viver/cultura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Sports | Health | Well-being</text:p>
          </table:table-cell>
          <table:table-cell office:value-type="string" table:style-name="ce4">
            <text:p>https://ipb.pt/pt/viver/desporto-saude-bem-estar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Live+</text:p>
          </table:table-cell>
          <table:table-cell office:value-type="string" table:style-name="ce4">
            <text:p>https://ipb.pt/pt/viver/viver-mais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bout IPB</text:p>
          </table:table-cell>
          <table:table-cell office:value-type="string" table:style-name="ce4">
            <text:p>https://ipb.pt/pt/ipb/sobre-o-ipb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hools</text:p>
          </table:table-cell>
          <table:table-cell office:value-type="string" table:style-name="ce4">
            <text:p>https://ipb.pt/pt/ipb/unidades-organicas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ocial Action</text:p>
          </table:table-cell>
          <table:table-cell office:value-type="string" table:style-name="ce4">
            <text:p>https://ipb.pt/pt/ipb/acao-social</text:p>
          </table:table-cell>
          <table:table-cell table:number-columns-repeated="16382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3</meta:generator>
    <dc:title/>
    <dc:description/>
    <dc:subject/>
    <meta:initial-creator/>
    <dc:creator>Natalia Gawrak</dc:creator>
    <meta:creation-date>2026-05-05T16:25:37Z</meta:creation-date>
    <dc:date>2026-05-05T16:25:37Z</dc:date>
    <meta:editing-cycles>5</meta:editing-cycles>
  </office:meta>
</office:document-meta>
</file>